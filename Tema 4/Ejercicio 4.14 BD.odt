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7c43f" officeooo:paragraph-rsid="0017c43f"/>
    </style:style>
    <style:style style:name="P2" style:family="paragraph" style:parent-style-name="Standard">
      <style:text-properties style:font-name="Courier New" fo:font-weight="bold" officeooo:rsid="0017c43f" officeooo:paragraph-rsid="0017c43f" style:font-weight-asian="bold" style:font-weight-complex="bold"/>
    </style:style>
    <style:style style:name="P3" style:family="paragraph" style:parent-style-name="Standard">
      <style:text-properties style:font-name="Courier New" fo:font-weight="normal" officeooo:rsid="0017c43f" officeooo:paragraph-rsid="0017c43f" style:font-weight-asian="normal" style:font-weight-complex="normal"/>
    </style:style>
    <style:style style:name="P4" style:family="paragraph" style:parent-style-name="Standard">
      <style:text-properties style:font-name="Courier New" fo:font-weight="bold" officeooo:rsid="001873fa" officeooo:paragraph-rsid="001873fa" style:font-weight-asian="bold" style:font-weight-complex="bold"/>
    </style:style>
    <style:style style:name="P5" style:family="paragraph" style:parent-style-name="Standard">
      <style:text-properties style:font-name="Courier New" fo:font-weight="normal" officeooo:rsid="0017c43f" officeooo:paragraph-rsid="001873fa" style:font-weight-asian="normal" style:font-weight-complex="normal"/>
    </style:style>
    <style:style style:name="P6" style:family="paragraph" style:parent-style-name="Standard">
      <style:text-properties style:font-name="Courier New" fo:font-weight="normal" officeooo:rsid="001873fa" officeooo:paragraph-rsid="001873fa" style:font-weight-asian="normal" style:font-weight-complex="normal"/>
    </style:style>
    <style:style style:name="P7" style:family="paragraph" style:parent-style-name="Standard">
      <style:text-properties style:font-name="Courier New" style:text-underline-style="none" fo:font-weight="normal" officeooo:rsid="001873fa" officeooo:paragraph-rsid="001873fa" style:font-weight-asian="normal" style:font-weight-complex="normal"/>
    </style:style>
    <style:style style:name="P8" style:family="paragraph" style:parent-style-name="Standard">
      <style:text-properties style:font-name="Courier New" style:text-underline-style="none" fo:font-weight="normal" officeooo:rsid="001a3e2c" officeooo:paragraph-rsid="001a3e2c" style:font-weight-asian="normal" style:font-weight-complex="normal"/>
    </style:style>
    <style:style style:name="P9" style:family="paragraph" style:parent-style-name="Standard">
      <style:text-properties style:font-name="Courier New" style:text-underline-style="none" fo:font-weight="bold" officeooo:rsid="001a3e2c" officeooo:paragraph-rsid="001a3e2c" style:font-weight-asian="bold" style:font-weight-complex="bold"/>
    </style:style>
    <style:style style:name="P10" style:family="paragraph" style:parent-style-name="Standard">
      <style:text-properties style:font-name="Courier New" fo:font-weight="normal" officeooo:rsid="0017c43f" officeooo:paragraph-rsid="001a3e2c" style:font-weight-asian="normal" style:font-weight-complex="normal"/>
    </style:style>
    <style:style style:name="P11" style:family="paragraph" style:parent-style-name="Standard">
      <style:text-properties officeooo:paragraph-rsid="001a3e2c"/>
    </style:style>
    <style:style style:name="P12" style:family="paragraph" style:parent-style-name="Standard">
      <style:text-properties style:font-name="Courier New" fo:font-weight="normal" officeooo:rsid="0017c43f" officeooo:paragraph-rsid="001b5b5b" style:font-weight-asian="normal" style:font-weight-complex="normal"/>
    </style:style>
    <style:style style:name="P13" style:family="paragraph" style:parent-style-name="Standard">
      <style:text-properties style:font-name="Courier New" fo:font-weight="normal" officeooo:rsid="001873fa" officeooo:paragraph-rsid="001a3e2c" style:font-weight-asian="normal" style:font-weight-complex="normal"/>
    </style:style>
    <style:style style:name="P14" style:family="paragraph" style:parent-style-name="Standard">
      <style:text-properties style:font-name="Courier New" style:text-underline-style="none" fo:font-weight="normal" officeooo:rsid="001873fa" officeooo:paragraph-rsid="001a3e2c" style:font-weight-asian="normal" style:font-weight-complex="normal"/>
    </style:style>
    <style:style style:name="P15" style:family="paragraph" style:parent-style-name="Standard">
      <style:text-properties style:font-name="Courier New" style:text-underline-style="none" fo:font-weight="normal" officeooo:rsid="001b5b5b" officeooo:paragraph-rsid="001b5b5b" style:font-weight-asian="normal" style:font-weight-complex="normal"/>
    </style:style>
    <style:style style:name="P16" style:family="paragraph" style:parent-style-name="Standard">
      <style:text-properties style:font-name="Courier New" style:text-underline-style="none" fo:font-weight="bold" officeooo:rsid="001b6c4e" officeooo:paragraph-rsid="001b6c4e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font-name="Courier New" fo:font-weight="normal" officeooo:rsid="0017c43f" style:font-weight-asian="normal" style:font-weight-complex="normal"/>
    </style:style>
    <style:style style:name="T5" style:family="text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4.14</text:p>
      <text:p text:style-name="P1">Tema 4. Transformación Entidad Relación</text:p>
      <text:p text:style-name="P1">Base De Datos</text:p>
      <text:p text:style-name="P1"/>
      <text:p text:style-name="P2">1. Regla de transformacion Entidades y Atributos.</text:p>
      <text:p text:style-name="P2"/>
      <text:p text:style-name="P3">Músicos(<text:span text:style-name="T1">#id</text:span>, nombre, apellidos, tipo, nacionalidad)</text:p>
      <text:p text:style-name="P3">Grupo(<text:span text:style-name="T1">#id</text:span>, tipo, nacionalidad, nombre_artístico)</text:p>
      <text:p text:style-name="P3">Albunes(<text:span text:style-name="T1">#id</text:span>, fecha, productores, título)</text:p>
      <text:p text:style-name="P3">Canciones(<text:span text:style-name="T1">#id</text:span>, duración, título, letra)</text:p>
      <text:p text:style-name="P3">Usuarios(<text:span text:style-name="T1">#id</text:span>, email, usuario, password)</text:p>
      <text:p text:style-name="P3">Registrado(<text:span text:style-name="T1">#usuario_id</text:span>)</text:p>
      <text:p text:style-name="P3">Editor(<text:span text:style-name="T1">#usuario_id</text:span>, componentes, num_registro, tipo_músico)</text:p>
      <text:p text:style-name="P3">Premium(<text:span text:style-name="T1">#usuario_id</text:span>, fecha_contrato, fecha_fin, importe)</text:p>
      <text:p text:style-name="P3"/>
      <text:p text:style-name="P4">2. Regla de transformación atributos M:N</text:p>
      <text:p text:style-name="P2"/>
      <text:p text:style-name="P5">Músicos(<text:span text:style-name="T1">#id</text:span>, nombre, apellidos, tipo, nacionalidad)</text:p>
      <text:p text:style-name="P5">Grupo(<text:span text:style-name="T1">#id</text:span>, tipo, nacionalidad, nombre_artístico)</text:p>
      <text:p text:style-name="P5">Albunes(<text:span text:style-name="T1">#id</text:span>, fecha, productores, título)</text:p>
      <text:p text:style-name="P5">Canciones(<text:span text:style-name="T1">#id</text:span>, duración, título, letra)</text:p>
      <text:p text:style-name="P5">Usuarios(<text:span text:style-name="T1">#id</text:span>, email, usuario, password)</text:p>
      <text:p text:style-name="P5">Registrado(<text:span text:style-name="T1">#usuario_id</text:span>)</text:p>
      <text:p text:style-name="P5">Editor(<text:span text:style-name="T1">#usuario_id</text:span>, componentes, num_registro, tipo_músico)</text:p>
      <text:p text:style-name="P5">Premium(<text:span text:style-name="T1">#usuario_id</text:span>, fecha_contrato, fecha_fin, importe)</text:p>
      <text:p text:style-name="P5"/>
      <text:p text:style-name="P6">Pueden_descargar(<text:span text:style-name="T1">#canciones_id, #usuarios_premium_id</text:span>, fecha, hora)</text:p>
      <text:p text:style-name="P6"><text:tab/>canciones_id → canciones(Not Null, BR, MR)</text:p>
      <text:p text:style-name="P6"><text:tab/>usuario_id → usuarios_premium_id(Not Null, BC, MR)</text:p>
      <text:p text:style-name="P6"/>
      <text:p text:style-name="P6">Pueden_escuchar(<text:span text:style-name="T1">#canciones_id, #usuario_id</text:span><text:span text:style-name="T2">,</text:span><text:span text:style-name="T3"> fecha, hora)</text:span></text:p>
      <text:p text:style-name="P7"><text:tab/>canciones_id → canciones(Not Null, BR, MR)</text:p>
      <text:p text:style-name="P7"><text:tab/>usuarios_id → usuarios(Not Null, BC, MR)</text:p>
      <text:p text:style-name="P7"/>
      <text:p text:style-name="P8">Albúm_pertenece_canciones(<text:span text:style-name="T1">#albúm_id, #canciones_id</text:span>)</text:p>
      <text:p text:style-name="P8"><text:tab/>albumes_id → album(Nor Null, BR, MR)</text:p>
      <text:p text:style-name="P8"><text:tab/>canciones_id → canciones(Not Null, BR, MR)</text:p>
      <text:p text:style-name="P8"/>
      <text:p text:style-name="P9">3. Regla de transformación atributos 1:N</text:p>
      <text:p text:style-name="P10"/>
      <text:p text:style-name="P10">Grupo(<text:span text:style-name="T1">#id</text:span>, tipo, nacionalidad, nombre_artístico)</text:p>
      <text:p text:style-name="P10">Usuarios(<text:span text:style-name="T1">#id</text:span>, email, usuario, password)</text:p>
      <text:p text:style-name="P10">Registrado(<text:span text:style-name="T1">#usuario_id</text:span>)</text:p>
      <text:p text:style-name="P11"><text:span text:style-name="T4"><text:tab/></text:span><text:span text:style-name="T5">id_usuario → Usuarios(N,BC,MC)</text:span> </text:p>
      <text:p text:style-name="P10">Editor(<text:span text:style-name="T1">#usuario_id</text:span>, componentes, num_registro, tipo_músico)</text:p>
      <text:p text:style-name="P12"><text:tab/>id_usuario → Usuarios(N,BC,MC) </text:p>
      <text:p text:style-name="P10">Premium(<text:span text:style-name="T1">#usuario_id</text:span>, fecha_contrato, fecha_fin, importe)</text:p>
      <text:p text:style-name="P12"><text:tab/>id_usuario → Usuarios(N,BC,MC) </text:p>
      <text:p text:style-name="P10"/>
      <text:p text:style-name="P13">Pueden_descargar(<text:span text:style-name="T1">#canciones_id, #usuarios_premium_id</text:span>, fecha, hora)</text:p>
      <text:p text:style-name="P13"><text:tab/>canciones_id → canciones(Not Null, BR, MR)</text:p>
      <text:p text:style-name="P13"><text:tab/>usuario_id → usuarios_premium_id(Not Null, BC, MR)</text:p>
      <text:p text:style-name="P13"/>
      <text:p text:style-name="P13"><text:soft-page-break/>Pueden_escuchar(<text:span text:style-name="T1">#canciones_id, #usuario_id</text:span><text:span text:style-name="T2">,</text:span><text:span text:style-name="T3"> fecha, hora)</text:span></text:p>
      <text:p text:style-name="P14"><text:tab/>canciones_id → canciones(Not Null, BR, MR)</text:p>
      <text:p text:style-name="P14"><text:tab/>usuarios_id → usuarios(Not Null, BC, MR)</text:p>
      <text:p text:style-name="P14"/>
      <text:p text:style-name="P8">Albúm_pertenece_canciones(<text:span text:style-name="T1">#albúm_id, #canciones_id</text:span>)</text:p>
      <text:p text:style-name="P8"><text:tab/>albumes_id → album(Nor Null, BR, MR)</text:p>
      <text:p text:style-name="P8"><text:tab/>canciones_id → canciones(Not Null, BR, MR)</text:p>
      <text:p text:style-name="P8"/>
      <text:p text:style-name="P15">Albumes(<text:span text:style-name="T1">#id</text:span>, productora, titulo, fecha, id_grupo) </text:p>
      <text:p text:style-name="P15"><text:tab/>id_grupo → Grupos(NN, BR, MC) </text:p>
      <text:p text:style-name="P15">Musicos(<text:span text:style-name="T1">#id</text:span>, nombre, apellidos, tipo, nacionalidad, id_grupo) <text:tab/>id_grupo → Grupos(NN, BR, MC) </text:p>
      <text:p text:style-name="P15">Canciones(<text:span text:style-name="T1">#id</text:span>, titulo, letra, duración, id_editor, fecha, hora) <text:tab/>id_editor → Editores(NN, BR, MC) </text:p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09:32:50.664471400</meta:creation-date>
    <dc:date>2025-11-28T10:17:00.849138300</dc:date>
    <meta:editing-duration>PT9M20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2" meta:paragraph-count="52" meta:word-count="240" meta:character-count="2360" meta:non-whitespace-character-count="2147"/>
  </office:meta>
</office:document-meta>
</file>