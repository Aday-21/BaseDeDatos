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0.4cm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Text_20_body">
      <style:paragraph-properties fo:line-height="0.4cm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0.4cm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0.4cm" fo:text-indent="0cm" style:auto-text-indent="false" style:writing-mode="lr-tb"/>
      <style:text-properties fo:font-size="10pt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0.4cm" fo:text-indent="0cm" style:auto-text-indent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ourier New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urier New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ourier New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ourier New" fo:font-style="normal" style:text-underline-style="none" fo:font-weight="normal" style:text-blinking="false" fo:background-color="transparent" loext:char-shading-value="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d2244c5-7fff-868c-9ffd-57d9308c038f"/>Ejercicio 4.4</text:p>
      <text:p text:style-name="P1">Tema 4</text:p>
      <text:p text:style-name="P1">Base de Datos</text:p>
      <text:p text:style-name="P1">Aday Trandafir Garcia</text:p>
      <text:p text:style-name="P1"/>
      <text:p text:style-name="P2">- Transformación de</text:p>
      <text:p text:style-name="P2">Relaciones 1:1</text:p>
      <text:p text:style-name="P3"/>
      <text:p text:style-name="P4">1.</text:p>
      <text:p text:style-name="P5"><text:span text:style-name="T1">Arbitro(#id, nombre, Ncolegiado)</text:span></text:p>
      <text:p text:style-name="P2">Partidos(#id, fecha, observaciones, arbitros_id)</text:p>
      <text:p text:style-name="P2">arbitro_id → arbitro (NOT NULL, M.C, B.R)</text:p>
      <text:p text:style-name="P3"/>
      <text:p text:style-name="P6"><text:span text:style-name="T2">2.</text:span></text:p>
      <text:p text:style-name="P2">Habitante (#id, DNI, nombre)</text:p>
      <text:p text:style-name="P2">Pasaporte (#id, numero, expedición id_habitante, fechaemision, fechacaducidad)</text:p>
      <text:p text:style-name="P2">id_habitante → habitante (NOT NULL, MC, BN)</text:p>
      <text:p text:style-name="P3"/>
      <text:p text:style-name="P5"><text:span text:style-name="T3">3.</text:span></text:p>
      <text:p text:style-name="P2">Jugador (#id, nombre)</text:p>
      <text:p text:style-name="P2">Equipo (#id, nombre, id_jugador, fecha)</text:p>
      <text:p text:style-name="P2">id_jugador → jugador (NOT NULL, MC, BN)</text:p>
      <text:p text:style-name="P3"/>
      <text:p text:style-name="P5"><text:span text:style-name="T3">4.</text:span></text:p>
      <text:p text:style-name="P2">Directores (#id, nombre, habitantes)</text:p>
      <text:p text:style-name="P5"><text:span text:style-name="T1">Colegios (#id, nombre, DNI, id_directores, fecha)</text:span></text:p>
      <text:p text:style-name="P2">id_directores → directores (NOT NULL, MC, BN)</text:p>
      <text:p text:style-name="P3"/>
      <text:p text:style-name="P5"><text:span text:style-name="T3">5</text:span><text:span text:style-name="T4">.</text:span></text:p>
      <text:p text:style-name="P2">Usuario (#id, nombre, email)</text:p>
      <text:p text:style-name="P2">EsAmigo (#id_usuario, id_amigo)</text:p>
      <text:p text:style-name="P2">id_usuario → usuario(NOT NULL, BR,MC)</text:p>
      <text:p text:style-name="P2">id_amigo → usuario(NOT NULL, BR,MC)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10:20:54.635036600</meta:creation-date>
    <dc:date>2025-11-21T10:24:09.800815000</dc:date>
    <meta:editing-duration>PT3M15S</meta:editing-duration>
    <meta:editing-cycles>1</meta:editing-cycles>
    <meta:document-statistic meta:table-count="0" meta:image-count="0" meta:object-count="0" meta:page-count="1" meta:paragraph-count="28" meta:word-count="101" meta:character-count="727" meta:non-whitespace-character-count="652"/>
    <meta:generator>LibreOffice/25.8.2.2$Windows_X86_64 LibreOffice_project/d401f2107ccab8f924a8e2df40f573aab7605b6f</meta:generator>
  </office:meta>
</office:document-meta>
</file>