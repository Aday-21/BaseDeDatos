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084959" officeooo:paragraph-rsid="00084959" style:font-size-asian="10pt" style:font-size-complex="10pt"/>
    </style:style>
    <style:style style:name="P2" style:family="paragraph" style:parent-style-name="Standard">
      <style:text-properties style:font-name="Courier new" fo:font-size="10pt" fo:font-weight="bold" officeooo:rsid="00084959" officeooo:paragraph-rsid="00084959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fo:font-weight="normal" officeooo:rsid="00084959" officeooo:paragraph-rsid="00084959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Courier new" fo:font-size="10pt" fo:font-weight="normal" officeooo:rsid="00084959" officeooo:paragraph-rsid="000856ed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ourier new" fo:font-size="10pt" fo:font-weight="bold" officeooo:rsid="000856ed" officeooo:paragraph-rsid="000856ed" style:font-size-asian="10pt" style:font-weight-asian="bold" style:font-size-complex="10pt" style:font-weight-complex="bold"/>
    </style:style>
    <style:style style:name="P6" style:family="paragraph" style:parent-style-name="Standard">
      <style:text-properties officeooo:paragraph-rsid="000856ed"/>
    </style:style>
    <style:style style:name="P7" style:family="paragraph" style:parent-style-name="Standard">
      <style:text-properties style:font-name="Courier new" fo:font-size="10pt" fo:font-weight="normal" officeooo:rsid="000856ed" officeooo:paragraph-rsid="000856ed" style:font-size-asian="10pt" style:font-weight-asian="normal" style:font-size-complex="10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856ed" style:font-weight-asian="bold" style:font-weight-complex="bold"/>
    </style:style>
    <style:style style:name="T5" style:family="text">
      <style:text-properties officeooo:rsid="000856ed"/>
    </style:style>
    <style:style style:name="T6" style:family="text">
      <style:text-properties style:text-underline-style="dotted" style:text-underline-width="bold" style:text-underline-color="font-color" officeooo:rsid="000856ed"/>
    </style:style>
    <style:style style:name="T7" style:family="text">
      <style:text-properties style:font-name="Courier new" fo:font-size="10pt" fo:font-weight="normal" officeooo:rsid="00084959" style:font-size-asian="10pt" style:font-weight-asian="normal" style:font-size-complex="10pt" style:font-weight-complex="normal"/>
    </style:style>
    <style:style style:name="T8" style:family="text">
      <style:text-properties style:font-name="Courier new" fo:font-size="10pt" fo:font-weight="normal" officeooo:rsid="000856ed" style:font-size-asian="10pt" style:font-weight-asian="normal" style:font-size-complex="10pt" style:font-weight-complex="normal"/>
    </style:style>
    <style:style style:name="T9" style:family="text">
      <style:text-properties style:text-underline-style="dotted" style:text-underline-width="bold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12</text:p>
      <text:p text:style-name="P1">Tema 4. Transformación Modelo Entidad Relación</text:p>
      <text:p text:style-name="P1">Curso 25/26</text:p>
      <text:p text:style-name="P2"/>
      <text:p text:style-name="P2">1. Regla de transformacion Entidades y Atributos.</text:p>
      <text:p text:style-name="P2"/>
      <text:p text:style-name="P3">Motos(<text:span text:style-name="T1">#id</text:span>, marca,<text:span text:style-name="T2"> matricula</text:span>, modelo, antigüedad, cilindrada)</text:p>
      <text:p text:style-name="P3">Repartidores(<text:span text:style-name="T1">#id</text:span>, nombre, apellido, <text:span text:style-name="T2">dni, email</text:span>, fecha_nac, edad-d)</text:p>
      <text:p text:style-name="P3">Clientes(<text:span text:style-name="T1">#id</text:span>, nombre, apellido, <text:span text:style-name="T2">teléfono</text:span>)</text:p>
      <text:p text:style-name="P3">Pedidos(<text:span text:style-name="T1">#id</text:span>, fecha, importe)</text:p>
      <text:p text:style-name="P3">Productos(<text:span text:style-name="T3">#id</text:span>, precio, descripción, categoría)</text:p>
      <text:p text:style-name="P3"/>
      <text:p text:style-name="P2">2. Regla transformación atributos multievaluados</text:p>
      <text:p text:style-name="P2"/>
      <text:p text:style-name="P3">Motos(<text:span text:style-name="T1">#id</text:span>, marca,<text:span text:style-name="T2"> matricula</text:span>, modelo, antigüedad, cilindrada)</text:p>
      <text:p text:style-name="P3">Repartidores(<text:span text:style-name="T1">#id</text:span>, nombre, apellido, <text:span text:style-name="T2">dni, email</text:span>, fecha_nac, edad-d)</text:p>
      <text:p text:style-name="P3">Clientes(<text:span text:style-name="T1">#id</text:span>, nombre, apellido, <text:span text:style-name="T2">teléfono</text:span>)</text:p>
      <text:p text:style-name="P3">Pedidos(<text:span text:style-name="T1">#id</text:span>, fecha, importe)</text:p>
      <text:p text:style-name="P3">Productos(<text:span text:style-name="T3">#id</text:span>, precio, descripción, categoría)</text:p>
      <text:p text:style-name="P3"/>
      <text:p text:style-name="P3">telefonos_repartidores(<text:span text:style-name="T1">#repartidor_id, #telefono</text:span>)</text:p>
      <text:p text:style-name="P3"><text:tab/>repartidor_id → repartidores(Not Null, BC, MR)</text:p>
      <text:p text:style-name="P3"/>
      <text:p text:style-name="P3">direcciones_clientes(<text:span text:style-name="T1">#cliente_id, #direccion</text:span>)</text:p>
      <text:p text:style-name="P3"><text:tab/>cliente_id → clientes(Not Null, BC, MR)</text:p>
      <text:p text:style-name="P3"/>
      <text:p text:style-name="P2">3. Transformacion Relaciones M:N</text:p>
      <text:p text:style-name="P2"/>
      <text:p text:style-name="P4">Motos(<text:span text:style-name="T1">#id</text:span>, marca,<text:span text:style-name="T2"> matricula</text:span>, modelo, antigüedad, cilindrada)</text:p>
      <text:p text:style-name="P4">Repartidores(<text:span text:style-name="T1">#id</text:span>, nombre, apellido, <text:span text:style-name="T2">dni, email</text:span>, fecha_nac, edad-d)</text:p>
      <text:p text:style-name="P4">Clientes(<text:span text:style-name="T1">#id</text:span>, nombre, apellido, <text:span text:style-name="T2">teléfono</text:span>)</text:p>
      <text:p text:style-name="P4">Pedidos(<text:span text:style-name="T1">#id</text:span>, fecha, importe)</text:p>
      <text:p text:style-name="P4">Productos(<text:span text:style-name="T3">#id</text:span>, precio, descripción, categoría)</text:p>
      <text:p text:style-name="P4"/>
      <text:p text:style-name="P4">telefonos_repartidores(<text:span text:style-name="T1">#repartidor_id, #telefono</text:span>)</text:p>
      <text:p text:style-name="P4"><text:tab/>repartidor_id → repartidores(Not Null, BC, MR)</text:p>
      <text:p text:style-name="P4"/>
      <text:p text:style-name="P4">direcciones_clientes(<text:span text:style-name="T1">#cliente_id, #direccion</text:span>)</text:p>
      <text:p text:style-name="P4"><text:tab/>cliente_id → clientes(Not Null, BC, MR)</text:p>
      <text:p text:style-name="P3"/>
      <text:p text:style-name="P3">pedidos_productos(<text:span text:style-name="T1">#pedido_id, #</text:span><text:span text:style-name="T4">producto_id</text:span><text:span text:style-name="T5">, cantidad, precio</text:span>)</text:p>
      <text:p text:style-name="P3"><text:tab/><text:span text:style-name="T5">pedido_id → Pedidos(Not Null, BC, MR)</text:span></text:p>
      <text:p text:style-name="P3"><text:tab/><text:span text:style-name="T5">producto_id → Productos(Not Null, BR, MR)</text:span></text:p>
      <text:p text:style-name="P3"/>
      <text:p text:style-name="P5">4. Traansformacion Relaciones 1:N</text:p>
      <text:p text:style-name="Standard"/>
      <text:p text:style-name="P4">Motos(<text:span text:style-name="T1">#id</text:span>, marca,<text:span text:style-name="T2"> matricula</text:span>, modelo, antigüedad, cilindrada)</text:p>
      <text:p text:style-name="P4">Repartidores(<text:span text:style-name="T1">#id</text:span>, nombre, apellido, <text:span text:style-name="T2">dni, email</text:span>, fecha_nac, edad-d)</text:p>
      <text:p text:style-name="P4">Clientes(<text:span text:style-name="T1">#id</text:span>, nombre, apellido, <text:span text:style-name="T2">teléfono</text:span>)<text:span text:style-name="T5">¡</text:span></text:p>
      <text:p text:style-name="P4">Productos(<text:span text:style-name="T3">#id</text:span>, precio, descripción, categoría)</text:p>
      <text:p text:style-name="P4"/>
      <text:p text:style-name="P4">telefonos_repartidores(<text:span text:style-name="T1">#repartidor_id, #telefono</text:span>)</text:p>
      <text:p text:style-name="P4"><text:tab/>repartidor_id → repartidores(Not Null, BC, MR)</text:p>
      <text:p text:style-name="P4"/>
      <text:p text:style-name="P4">direcciones_clientes(<text:span text:style-name="T1">#cliente_id, #direccion</text:span>)</text:p>
      <text:p text:style-name="P4"><text:tab/>cliente_id → clientes(Not Null, BC, MR)</text:p>
      <text:p text:style-name="P4"/>
      <text:p text:style-name="P4">pedidos_productos(<text:span text:style-name="T1">#pedido_id, #</text:span><text:span text:style-name="T4">producto_id</text:span><text:span text:style-name="T5">, cantidad, precio</text:span>)</text:p>
      <text:p text:style-name="P4"><text:tab/><text:span text:style-name="T5">pedido_id → Pedidos(Not Null, BC, MR)</text:span></text:p>
      <text:p text:style-name="P4"><text:tab/><text:span text:style-name="T5">producto_id → Productos(Not Null, BR, MR)</text:span></text:p>
      <text:p text:style-name="P4"/>
      <text:p text:style-name="P4">Pedidos(<text:span text:style-name="T1">#id</text:span>, fecha, importe, <text:span text:style-name="T5">hora,</text:span> <text:span text:style-name="T6">cliente_id</text:span>)</text:p>
      <text:p text:style-name="P4"><text:tab/><text:span text:style-name="T5">cliente_id → clientes(Not Null, BR, MR)</text:span></text:p>
      <text:p text:style-name="P4"><text:soft-page-break/></text:p>
      <text:p text:style-name="P5">5. Transformación Relación ternaria 1:1:M</text:p>
      <text:p text:style-name="P5"/>
      <text:p text:style-name="P4">Motos(<text:span text:style-name="T1">#id</text:span>, marca,<text:span text:style-name="T2"> matricula</text:span>, modelo, antigüedad, cilindrada)</text:p>
      <text:p text:style-name="P4">Repartidores(<text:span text:style-name="T1">#id</text:span>, nombre, apellido, <text:span text:style-name="T2">dni, email</text:span>, fecha_nac, edad-d)</text:p>
      <text:p text:style-name="P4">Clientes(<text:span text:style-name="T1">#id</text:span>, nombre, apellido, <text:span text:style-name="T2">teléfono</text:span>)<text:span text:style-name="T5">¡</text:span></text:p>
      <text:p text:style-name="P4">Productos(<text:span text:style-name="T3">#id</text:span>, precio, descripción, categoría)</text:p>
      <text:p text:style-name="P4"/>
      <text:p text:style-name="P4">telefonos_repartidores(<text:span text:style-name="T1">#repartidor_id, #telefono</text:span>)</text:p>
      <text:p text:style-name="P4"><text:tab/>repartidor_id → repartidores(Not Null, BC, MR)</text:p>
      <text:p text:style-name="P4"/>
      <text:p text:style-name="P4">direcciones_clientes(<text:span text:style-name="T1">#cliente_id, #direccion</text:span>)</text:p>
      <text:p text:style-name="P4"><text:tab/>cliente_id → clientes(Not Null, BC, MR)</text:p>
      <text:p text:style-name="P4"/>
      <text:p text:style-name="P4">pedidos_productos(<text:span text:style-name="T1">#pedido_id, #</text:span><text:span text:style-name="T4">producto_id</text:span><text:span text:style-name="T5">, cantidad, precio</text:span>)</text:p>
      <text:p text:style-name="P4"><text:tab/><text:span text:style-name="T5">pedido_id → Pedidos(Not Null, BC, MR)</text:span></text:p>
      <text:p text:style-name="P4"><text:tab/><text:span text:style-name="T5">producto_id → Productos(Not Null, BR, MR)</text:span></text:p>
      <text:p text:style-name="P4"/>
      <text:p text:style-name="P4">Pedidos(<text:span text:style-name="T1">#id</text:span>, fecha, importe, <text:span text:style-name="T5">hora,</text:span> <text:span text:style-name="T6">cliente_id</text:span>)</text:p>
      <text:p text:style-name="P6"><text:span text:style-name="T7"><text:tab/></text:span><text:span text:style-name="T8">cliente_id → clientes(Not Null, BR, MR)</text:span></text:p>
      <text:p text:style-name="P7"/>
      <text:p text:style-name="P7">Repartidor_moto_pedido(<text:span text:style-name="T1">#pedido_id, #repartidor_id</text:span>, <text:span text:style-name="T9">#moto_id</text:span>, distancia_recorrida, tiempo_efectuado)</text:p>
      <text:p text:style-name="P7"><text:tab/>pedido_id → pedido(Not Null, BR, MR)</text:p>
      <text:p text:style-name="P7"><text:tab/>repartidor_id → repartidor(Not Null, BR, MR)</text:p>
      <text:p text:style-name="P7"><text:tab/>moto_id → moto(Not Null, BR, MR)</text:p>
      <text:p text:style-name="P7"/>
      <text:p text:style-name="P5">6. Modelo Relacional Definitivo.</text:p>
      <text:p text:style-name="P5"/>
      <text:p text:style-name="P4">Motos(<text:span text:style-name="T1">#id</text:span>, marca,<text:span text:style-name="T2"> matricula</text:span>, modelo, antigüedad, cilindrada)</text:p>
      <text:p text:style-name="P4">Repartidores(<text:span text:style-name="T1">#id</text:span>, nombre, apellido, <text:span text:style-name="T2">dni, email</text:span>, fecha_nac, edad-d)</text:p>
      <text:p text:style-name="P4">Clientes(<text:span text:style-name="T1">#id</text:span>, nombre, apellido, <text:span text:style-name="T2">teléfono</text:span>)<text:span text:style-name="T5">¡</text:span></text:p>
      <text:p text:style-name="P4">Productos(<text:span text:style-name="T3">#id</text:span>, precio, descripción, categoría)</text:p>
      <text:p text:style-name="P4"/>
      <text:p text:style-name="P4">telefonos_repartidores(<text:span text:style-name="T1">#repartidor_id, #telefono</text:span>)</text:p>
      <text:p text:style-name="P4"><text:tab/>repartidor_id → repartidores(Not Null, BC, MR)</text:p>
      <text:p text:style-name="P4"/>
      <text:p text:style-name="P4">direcciones_clientes(<text:span text:style-name="T1">#cliente_id, #direccion</text:span>)</text:p>
      <text:p text:style-name="P4"><text:tab/>cliente_id → clientes(Not Null, BC, MR)</text:p>
      <text:p text:style-name="P4"/>
      <text:p text:style-name="P4">pedidos_productos(<text:span text:style-name="T1">#pedido_id, #</text:span><text:span text:style-name="T4">producto_id</text:span><text:span text:style-name="T5">, cantidad, precio</text:span>)</text:p>
      <text:p text:style-name="P4"><text:tab/><text:span text:style-name="T5">pedido_id → Pedidos(Not Null, BC, MR)</text:span></text:p>
      <text:p text:style-name="P4"><text:tab/><text:span text:style-name="T5">producto_id → Productos(Not Null, BR, MR)</text:span></text:p>
      <text:p text:style-name="P4"/>
      <text:p text:style-name="P4">Pedidos(<text:span text:style-name="T1">#id</text:span>, fecha, importe, <text:span text:style-name="T5">hora,</text:span> <text:span text:style-name="T6">cliente_id</text:span>)</text:p>
      <text:p text:style-name="P6"><text:span text:style-name="T7"><text:tab/></text:span><text:span text:style-name="T8">cliente_id → clientes(Not Null, BR, MR)</text:span></text:p>
      <text:p text:style-name="P7"/>
      <text:p text:style-name="P7">Repartidor_moto_pedido(<text:span text:style-name="T1">#pedido_id, #repartidor_id</text:span>, <text:span text:style-name="T9">#moto_id</text:span>, distancia_recorrida, tiempo_efectuado)</text:p>
      <text:p text:style-name="P7"><text:tab/>pedido_id → pedido(Not Null, BR, MR)</text:p>
      <text:p text:style-name="P7"><text:tab/>repartidor_id → repartidor(Not Null, BR, MR)</text:p>
      <text:p text:style-name="P7"><text:tab/>moto_id → moto(Not Null, BR, MR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6T08:40:09.302991605</meta:creation-date>
    <dc:date>2025-11-26T09:06:21.615919183</dc:date>
    <meta:editing-duration>PT1S</meta:editing-duration>
    <meta:editing-cycles>1</meta:editing-cycles>
    <meta:document-statistic meta:table-count="0" meta:image-count="0" meta:object-count="0" meta:page-count="2" meta:paragraph-count="82" meta:word-count="397" meta:character-count="3826" meta:non-whitespace-character-count="3484"/>
    <meta:generator>LibreOffice/25.2.3.2$Linux_X86_64 LibreOffice_project/520$Build-2</meta:generator>
  </office:meta>
</office:document-meta>
</file>