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officeooo:rsid="001e2eac" officeooo:paragraph-rsid="0010c8d4" style:font-size-asian="10pt" style:font-size-complex="10pt"/>
    </style:style>
    <style:style style:name="P2" style:family="paragraph" style:parent-style-name="Standard">
      <style:text-properties style:font-name="Courier New" fo:font-size="10pt" fo:font-weight="bold" officeooo:rsid="0010c8d4" officeooo:paragraph-rsid="0010c8d4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Courier New" fo:font-size="10pt" fo:font-weight="normal" officeooo:rsid="0010c8d4" officeooo:paragraph-rsid="0010c8d4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Courier New" fo:font-size="10pt" style:text-underline-style="none" fo:font-weight="normal" officeooo:rsid="0010c8d4" officeooo:paragraph-rsid="0010c8d4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Courier New" fo:font-size="10pt" style:text-underline-style="none" fo:font-weight="normal" officeooo:rsid="0011341f" officeooo:paragraph-rsid="0011341f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Courier New" fo:font-size="10pt" style:text-underline-style="none" fo:font-weight="normal" officeooo:rsid="0010c8d4" officeooo:paragraph-rsid="0011341f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Courier New" fo:font-size="10pt" style:text-underline-style="none" fo:font-weight="bold" officeooo:rsid="0011341f" officeooo:paragraph-rsid="0011341f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Courier New" fo:font-size="10pt" fo:font-weight="normal" officeooo:rsid="0010c8d4" officeooo:paragraph-rsid="0011341f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Courier New" fo:font-size="10pt" style:text-underline-style="none" fo:font-weight="normal" officeooo:rsid="0010c8d4" officeooo:paragraph-rsid="001453e2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Courier New" fo:font-size="10pt" style:text-underline-style="none" fo:font-weight="bold" officeooo:rsid="001453e2" officeooo:paragraph-rsid="001453e2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Courier New" fo:font-size="10pt" style:text-underline-style="none" fo:font-weight="normal" officeooo:rsid="0011341f" officeooo:paragraph-rsid="001453e2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Courier New" fo:font-size="10pt" fo:font-weight="normal" officeooo:rsid="0010c8d4" officeooo:paragraph-rsid="001453e2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Courier New" fo:font-size="10pt" style:text-underline-style="none" fo:font-weight="normal" officeooo:rsid="0011341f" officeooo:paragraph-rsid="0015cd5e" style:font-size-asian="10pt" style:font-weight-asian="normal" style:font-size-complex="10pt" style:font-weight-complex="normal"/>
    </style:style>
    <style:style style:name="T1" style:family="text">
      <style:text-properties officeooo:rsid="0010c8d4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officeooo:rsid="0011341f"/>
    </style:style>
    <style:style style:name="T5" style:family="text">
      <style:text-properties style:text-underline-style="solid" style:text-underline-width="auto" style:text-underline-color="font-color" fo:font-weight="bold" officeooo:rsid="0011341f" style:font-weight-asian="bold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officeooo:rsid="001453e2" style:font-weight-asian="bold" style:font-weight-complex="bold"/>
    </style:style>
    <style:style style:name="T8" style:family="text">
      <style:text-properties officeooo:rsid="001453e2"/>
    </style:style>
    <style:style style:name="T9" style:family="text">
      <style:text-properties officeooo:rsid="00130a9c"/>
    </style:style>
    <style:style style:name="T10" style:family="text">
      <style:text-properties style:text-underline-style="dotted" style:text-underline-width="bold" style:text-underline-color="font-color" officeooo:rsid="001453e2"/>
    </style:style>
    <style:style style:name="T11" style:family="text">
      <style:text-properties officeooo:rsid="00159129"/>
    </style:style>
    <style:style style:name="T12" style:family="text">
      <style:text-properties style:text-underline-style="dotted" style:text-underline-width="bold" style:text-underline-color="font-color" officeooo:rsid="0015cd5e"/>
    </style:style>
    <style:style style:name="T13" style:family="text">
      <style:text-properties officeooo:rsid="0015cd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e <text:span text:style-name="T1">2</text:span></text:p>
      <text:p text:style-name="P1">Examen Tema 4</text:p>
      <text:p text:style-name="P1">Curso 25/26</text:p>
      <text:p text:style-name="P1"/>
      <text:p text:style-name="P2">1. Regla de transformación de Entidades y Atributos.</text:p>
      <text:p text:style-name="P2"/>
      <text:p text:style-name="P3">Clientes(<text:span text:style-name="T2">#id</text:span><text:span text:style-name="T3">, nombre, direccion)</text:span></text:p>
      <text:p text:style-name="P4">Telefono<text:span text:style-name="T4">s</text:span>(<text:span text:style-name="T2">#cliente</text:span><text:span text:style-name="T5">s</text:span><text:span text:style-name="T2">_id, #telefono</text:span><text:span text:style-name="T5">s</text:span>)</text:p>
      <text:p text:style-name="P4"><text:tab/><text:span text:style-name="T4">clientes_id → Clientes(NN, BC, MR)</text:span></text:p>
      <text:p text:style-name="P5">Empleado(<text:span text:style-name="T2">#id</text:span>, nombre, <text:span text:style-name="T6">nss</text:span>, <text:span text:style-name="T6">dni</text:span>)</text:p>
      <text:p text:style-name="P6">Telefono<text:span text:style-name="T4">s</text:span>(<text:span text:style-name="T2">#</text:span><text:span text:style-name="T7">Empleado</text:span><text:span text:style-name="T2">_id, #telefono</text:span><text:span text:style-name="T5">s</text:span>)</text:p>
      <text:p text:style-name="P6"><text:tab/><text:span text:style-name="T8">Empleados</text:span><text:span text:style-name="T4">_id → </text:span><text:span text:style-name="T8">Empleado</text:span><text:span text:style-name="T4">(NN, BC, MR)</text:span></text:p>
      <text:p text:style-name="P5">Servicio Reparacion(<text:span text:style-name="T2">#id</text:span>, importe_total, forma_pago, fecha)</text:p>
      <text:p text:style-name="P5">Repuestos(<text:span text:style-name="T2">#id</text:span>, precio, descripcion, stock)</text:p>
      <text:p text:style-name="P5">Vehiculo(<text:span text:style-name="T2">#id</text:span>, <text:span text:style-name="T6">matricula</text:span>, fecha_mat, modelo)</text:p>
      <text:p text:style-name="P5">Marca(<text:span text:style-name="T2">#id</text:span>, gama, <text:span text:style-name="T6">marca</text:span>, pais)</text:p>
      <text:p text:style-name="P5">Beneficiarios(<text:span text:style-name="T2">#id</text:span>, fecha_nac, edad-d, <text:span text:style-name="T6">dni</text:span>, parentesco, nombre)</text:p>
      <text:p text:style-name="P5"/>
      <text:p text:style-name="P7">2. Regla de transformación Relación M:N</text:p>
      <text:p text:style-name="P7"/>
      <text:p text:style-name="P8">Clientes(<text:span text:style-name="T2">#id</text:span><text:span text:style-name="T3">, nombre, direccion)</text:span></text:p>
      <text:p text:style-name="P6">Telefono<text:span text:style-name="T4">s</text:span>(<text:span text:style-name="T2">#</text:span><text:span text:style-name="T7">C</text:span><text:span text:style-name="T2">liente</text:span><text:span text:style-name="T5">s</text:span><text:span text:style-name="T2">_id, #telefono</text:span><text:span text:style-name="T5">s</text:span>)</text:p>
      <text:p text:style-name="P6"><text:tab/><text:span text:style-name="T4">clientes_id → Clientes(NN, BC, MR)</text:span></text:p>
      <text:p text:style-name="P5">Vehiculo(<text:span text:style-name="T2">#id</text:span>, <text:span text:style-name="T6">matricula</text:span>, fecha_mat, modelo)</text:p>
      <text:p text:style-name="P5">Marca(<text:span text:style-name="T2">#id</text:span>, gama, <text:span text:style-name="T6">marca</text:span>, pais)</text:p>
      <text:p text:style-name="P5">Beneficiarios(<text:span text:style-name="T2">#id</text:span>, fecha_nac, edad-d, <text:span text:style-name="T6">dni</text:span>, parentesco, nombre)</text:p>
      <text:p text:style-name="P5"/>
      <text:p text:style-name="P5">Empleado(<text:span text:style-name="T2">#id</text:span>, nombre, <text:span text:style-name="T6">nss</text:span>, <text:span text:style-name="T6">dni</text:span>)</text:p>
      <text:p text:style-name="P9">Telefono<text:span text:style-name="T4">s</text:span>(<text:span text:style-name="T2">#</text:span><text:span text:style-name="T7">Empleado</text:span><text:span text:style-name="T2">_id, #telefono</text:span><text:span text:style-name="T5">s</text:span>)</text:p>
      <text:p text:style-name="P9"><text:tab/><text:span text:style-name="T8">Empleados</text:span><text:span text:style-name="T4">_id → </text:span><text:span text:style-name="T8">Empleado</text:span><text:span text:style-name="T4">(NN, BC, MR)</text:span></text:p>
      <text:p text:style-name="P5"/>
      <text:p text:style-name="P5">Realizan(<text:span text:style-name="T2">#Empleado_id, #Servicio Reparacion_id</text:span>, horas, precio)</text:p>
      <text:p text:style-name="P5"><text:tab/>Empleado_id → Empleado(NN, BR, MR)</text:p>
      <text:p text:style-name="P5"><text:tab/>Servicio Reparacion_id → Servicio Reparacion(NN, BR, MR)</text:p>
      <text:p text:style-name="P5"/>
      <text:p text:style-name="P5">Servicio Reparacion(<text:span text:style-name="T2">#id</text:span>, importe_total, forma_pago, fecha)</text:p>
      <text:p text:style-name="P5">Repuestos(<text:span text:style-name="T2">#id</text:span>, precio, descripcion, stock)</text:p>
      <text:p text:style-name="P5"/>
      <text:p text:style-name="P5">Incluyen(<text:span text:style-name="T2">#Servicio Reparacion_id, #Repuestos_id</text:span>, cantidad, precio)</text:p>
      <text:p text:style-name="P5"><text:tab/>Servicio Reparacion_id → Servicio Reparacion(NN, BR, MR)</text:p>
      <text:p text:style-name="P5"><text:tab/>Repuestos_id → Repuestos(<text:span text:style-name="T9">NN, BR, MR)</text:span></text:p>
      <text:p text:style-name="P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3. Regla de transformación Relación 1:N</text:p>
      <text:p text:style-name="P11"/>
      <text:p text:style-name="P9">Telefono<text:span text:style-name="T4">s</text:span>(<text:span text:style-name="T2">#</text:span><text:span text:style-name="T7">Empleado</text:span><text:span text:style-name="T2">_id, #telefono</text:span><text:span text:style-name="T5">s</text:span>)</text:p>
      <text:p text:style-name="P9"><text:tab/><text:span text:style-name="T8">Empleados</text:span><text:span text:style-name="T4">_id → </text:span><text:span text:style-name="T8">Empleado</text:span><text:span text:style-name="T4">(NN, BC, MR)</text:span></text:p>
      <text:p text:style-name="P9"/>
      <text:p text:style-name="P11">Realizan(<text:span text:style-name="T2">#Empleado_id, #Servicio Reparacion_id</text:span>, horas, precio)</text:p>
      <text:p text:style-name="P11"><text:tab/>Empleado_id → Empleado(NN, BR, MR)</text:p>
      <text:p text:style-name="P11"><text:tab/>Servicio Reparacion_id → Servicio Reparacion(NN, BR, MR)</text:p>
      <text:p text:style-name="P11"/>
      <text:p text:style-name="P11">Repuestos(<text:span text:style-name="T2">#id</text:span>, precio, descripcion, stock)</text:p>
      <text:p text:style-name="P11"/>
      <text:p text:style-name="P11">Incluyen(<text:span text:style-name="T2">#Servicio Reparacion_id, #Repuestos_id</text:span>, cantidad, precio)</text:p>
      <text:p text:style-name="P11"><text:tab/>Servicio Reparacion_id → Servicio Reparacion(NN, BR, MR)</text:p>
      <text:p text:style-name="P11"><text:tab/>Repuestos_id → Repuestos(<text:span text:style-name="T9">NN, BR, MR)</text:span></text:p>
      <text:p text:style-name="P11"/>
      <text:p text:style-name="P12">Clientes(<text:span text:style-name="T2">#id</text:span>, nombre, direccion)</text:p>
      <text:p text:style-name="P9">Telefono<text:span text:style-name="T4">s</text:span>(<text:span text:style-name="T2">#cliente</text:span><text:span text:style-name="T5">s</text:span><text:span text:style-name="T2">_id, #telefono</text:span><text:span text:style-name="T5">s</text:span>)</text:p>
      <text:p text:style-name="P9"><text:tab/><text:span text:style-name="T4">clientes_id → Clientes(NN, BC, MR)</text:span></text:p>
      <text:p text:style-name="P11"/>
      <text:p text:style-name="P11">Servicio Reparacion(<text:span text:style-name="T2">#id</text:span>, importe_total, forma_pago, fecha, <text:span text:style-name="T10">Clientes_id</text:span><text:span text:style-name="T8">, </text:span><text:span text:style-name="T10">Vehiculo_id</text:span>)</text:p>
      <text:p text:style-name="P11"><text:tab/><text:span text:style-name="T8">Clientes_id → Clientes(NN, BR, MR)</text:span></text:p>
      <text:p text:style-name="P11"><text:tab/><text:span text:style-name="T8">Vehiculo_id → Vehiculo(NN, BR, MR)</text:span></text:p>
      <text:p text:style-name="P11"/>
      <text:p text:style-name="P11">Marca(<text:span text:style-name="T2">#id</text:span>, gama, <text:span text:style-name="T6">marca</text:span>, pais)</text:p>
      <text:p text:style-name="P11">Vehiculo(<text:span text:style-name="T2">#id</text:span>, <text:span text:style-name="T6">matricula</text:span>, fecha_mat, modelo, <text:span text:style-name="T10">Marca_id</text:span>)</text:p>
      <text:p text:style-name="P11"><text:tab/><text:span text:style-name="T8">Marca_id → Marca(NN, BR, MR)</text:span></text:p>
      <text:p text:style-name="P11"/>
      <text:p text:style-name="P11">Beneficiarios(<text:span text:style-name="T2">#id</text:span>, fecha_nac, edad-d, <text:span text:style-name="T6">dni</text:span>, parentesco, nombre, <text:span text:style-name="T10">Empleado_id</text:span>)</text:p>
      <text:p text:style-name="P11"><text:tab/><text:span text:style-name="T11">Empleado_id → Empleado(NN, BC, MC)</text:span></text:p>
      <text:p text:style-name="P11"/>
      <text:p text:style-name="P11"/>
      <text:p text:style-name="P13">Empleado(<text:span text:style-name="T2">#id</text:span>, nombre, <text:span text:style-name="T6">nss</text:span>, <text:span text:style-name="T6">dni</text:span>, <text:span text:style-name="T12">jefe_id</text:span>)</text:p>
      <text:p text:style-name="P13"><text:tab/><text:span text:style-name="T13">jefe_id → Empleado(NN, BR, MR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1T10:35:30.478636500</meta:creation-date>
    <dc:date>2025-12-01T11:05:12.644266200</dc:date>
    <meta:editing-duration>PT6M14S</meta:editing-duration>
    <meta:editing-cycles>4</meta:editing-cycles>
    <meta:generator>LibreOffice/25.8.3.2$Windows_X86_64 LibreOffice_project/8ca8d55c161d602844f5428fa4b58097424e324e</meta:generator>
    <meta:document-statistic meta:table-count="0" meta:image-count="0" meta:object-count="0" meta:page-count="2" meta:paragraph-count="56" meta:word-count="257" meta:character-count="2326" meta:non-whitespace-character-count="2106"/>
  </office:meta>
</office:document-meta>
</file>