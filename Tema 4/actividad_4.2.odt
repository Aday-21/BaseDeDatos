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d9f06" officeooo:paragraph-rsid="0020fd75" style:font-size-asian="8.75pt" style:font-size-complex="10pt"/>
    </style:style>
    <style:style style:name="P2" style:family="paragraph" style:parent-style-name="Standard">
      <style:text-properties style:font-name="Courier New" fo:font-size="10pt" officeooo:rsid="001bf924" officeooo:paragraph-rsid="0020fd75" style:font-size-asian="8.75pt" style:font-size-complex="10pt"/>
    </style:style>
    <style:style style:name="P3" style:family="paragraph" style:parent-style-name="Standard">
      <style:text-properties style:font-name="Courier New" fo:font-size="10pt" officeooo:rsid="00188da1" officeooo:paragraph-rsid="0020fd75" style:font-size-asian="8.75pt" style:font-size-complex="10pt"/>
    </style:style>
    <style:style style:name="P4" style:family="paragraph" style:parent-style-name="Standard">
      <style:text-properties style:font-name="Courier New" fo:font-size="10pt" officeooo:rsid="001d9f06" officeooo:paragraph-rsid="001d9f06" style:font-size-asian="8.75pt" style:font-size-complex="10pt"/>
    </style:style>
    <style:style style:name="P5" style:family="paragraph" style:parent-style-name="Standard">
      <style:text-properties style:font-name="Courier New" fo:font-size="10pt" officeooo:rsid="001e5bf2" officeooo:paragraph-rsid="001e5bf2" style:font-size-asian="8.75pt" style:font-size-complex="10pt"/>
    </style:style>
    <style:style style:name="T1" style:family="text">
      <style:text-properties officeooo:rsid="0020fd75"/>
    </style:style>
    <style:style style:name="T2" style:family="text">
      <style:text-properties officeooo:rsid="00188da1"/>
    </style:style>
    <style:style style:name="T3" style:family="text">
      <style:text-properties officeooo:rsid="001ab8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officeooo:rsid="001f3d1f" style:font-weight-asian="bold" style:font-weight-complex="bold"/>
    </style:style>
    <style:style style:name="T8" style:family="text">
      <style:text-properties style:text-underline-style="none" fo:font-weight="normal" officeooo:rsid="001f3d1f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 fo:font-weight="normal" officeooo:rsid="001e5bf2" style:font-weight-asian="normal" style:font-weight-complex="normal"/>
    </style:style>
    <style:style style:name="T11" style:family="text">
      <style:text-properties style:text-underline-style="none" fo:font-weight="bold" officeooo:rsid="001f3d1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text:span text:style-name="T2">Actividad 4.</text:span><text:span text:style-name="T1">2</text:span><text:span text:style-name="T2"> </text:span></text:p>
      <text:p text:style-name="P2">Tema 4</text:p>
      <text:p text:style-name="P2">Base de Datos</text:p>
      <text:p text:style-name="P3">A<text:span text:style-name="T3">day Trandafir Garcia</text:span></text:p>
      <text:p text:style-name="P4"/>
      <text:p text:style-name="P4"/>
      <text:p text:style-name="P4"/>
      <text:p text:style-name="P4">1.</text:p>
      <text:p text:style-name="P4"/>
      <text:p text:style-name="P4">Pedido{<text:span text:style-name="T4">#</text:span><text:span text:style-name="T5">id</text:span><text:span text:style-name="T6">, fecha, importe, importe_iva, importe_total-d</text:span>}</text:p>
      <text:p text:style-name="P4"/>
      <text:p text:style-name="P4">Incluye{<text:span text:style-name="T7">#id_pedido, #id_articulos,</text:span><text:span text:style-name="T8"> </text:span>precio, descuento, iva, cantidad}</text:p>
      <text:p text:style-name="P4"/>
      <text:p text:style-name="P4">Articulos{<text:span text:style-name="T9">#id</text:span><text:span text:style-name="T6">, descripcion, precio</text:span>}</text:p>
      <text:p text:style-name="P4"/>
      <text:p text:style-name="P4">2.</text:p>
      <text:p text:style-name="P4"/>
      <text:p text:style-name="P4">Cancion{<text:span text:style-name="T9">#id</text:span><text:span text:style-name="T6">, titulo</text:span>}</text:p>
      <text:p text:style-name="P4"/>
      <text:p text:style-name="P4">Escucha{<text:span text:style-name="T7">#id_cancion, #id_usuario,</text:span><text:span text:style-name="T8"> </text:span>fecha, hora}</text:p>
      <text:p text:style-name="P4"/>
      <text:p text:style-name="P4">Usuario{<text:span text:style-name="T9">#id</text:span><text:span text:style-name="T6">, nombre, </text:span><text:span text:style-name="T10">email-d</text:span>}</text:p>
      <text:p text:style-name="P4"/>
      <text:p text:style-name="P5">3.</text:p>
      <text:p text:style-name="P5"/>
      <text:p text:style-name="P5">Jugadores{<text:span text:style-name="T9">#id</text:span><text:span text:style-name="T6">, nombre</text:span>}</text:p>
      <text:p text:style-name="P5"/>
      <text:p text:style-name="P5">Juega{<text:span text:style-name="T7">#id_jugadores, #id_partidos,</text:span><text:span text:style-name="T11"> </text:span>pases, goles, minutos, tarjetas}</text:p>
      <text:p text:style-name="P5"/>
      <text:p text:style-name="P5">Partidos{<text:span text:style-name="T9">#id</text:span><text:span text:style-name="T6">, fecha, jornada</text:span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0:12:06.612078700</meta:creation-date>
    <dc:date>2025-11-17T10:25:12.245728200</dc:date>
    <meta:editing-duration>PT14M10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6" meta:word-count="48" meta:character-count="434" meta:non-whitespace-character-count="402"/>
  </office:meta>
</office:document-meta>
</file>