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b8a49" officeooo:paragraph-rsid="001b8a49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1b8a49" style:font-size-asian="10pt" style:font-size-complex="10pt"/>
    </style:style>
    <style:style style:name="P3" style:family="paragraph" style:parent-style-name="Standard">
      <style:text-properties style:font-name="Courier New" fo:font-size="10pt" officeooo:rsid="001bacdb" officeooo:paragraph-rsid="001bacdb" style:font-size-asian="10pt" style:font-size-complex="10pt"/>
    </style:style>
    <style:style style:name="P4" style:family="paragraph" style:parent-style-name="Standard">
      <style:text-properties style:font-name="Courier New" officeooo:rsid="001b8a49" officeooo:paragraph-rsid="001b8a49"/>
    </style:style>
    <style:style style:name="P5" style:family="paragraph" style:parent-style-name="Standard">
      <style:text-properties style:font-name="Courier New" fo:font-size="10pt" officeooo:rsid="001b8a49" officeooo:paragraph-rsid="001bacdb" style:font-size-asian="10pt" style:font-size-complex="10pt"/>
    </style:style>
    <style:style style:name="P6" style:family="paragraph" style:parent-style-name="Standard">
      <style:text-properties style:font-name="Courier New" fo:font-size="10pt" officeooo:rsid="001c733e" officeooo:paragraph-rsid="001c733e" style:font-size-asian="10pt" style:font-size-complex="10pt"/>
    </style:style>
    <style:style style:name="P7" style:family="paragraph" style:parent-style-name="Standard">
      <style:text-properties style:font-name="Courier New" fo:font-size="10pt" officeooo:rsid="001e5a88" officeooo:paragraph-rsid="001e5a88" style:font-size-asian="10pt" style:font-size-complex="10pt"/>
    </style:style>
    <style:style style:name="P8" style:family="paragraph" style:parent-style-name="Standard">
      <style:text-properties style:font-name="Courier New" fo:font-size="10pt" officeooo:rsid="001e5a88" officeooo:paragraph-rsid="00204b3b" style:font-size-asian="10pt" style:font-size-complex="10pt"/>
    </style:style>
    <style:style style:name="P9" style:family="paragraph" style:parent-style-name="Standard">
      <style:text-properties style:font-name="Courier New" fo:font-size="10pt" style:text-underline-style="none" fo:font-weight="normal" officeooo:rsid="00204b3b" officeooo:paragraph-rsid="001e5a88" style:font-size-asian="10pt" style:font-weight-asian="normal" style:font-size-complex="10pt" style:font-weight-complex="normal"/>
    </style:style>
    <style:style style:name="T1" style:family="text">
      <style:text-properties officeooo:rsid="001b8a4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 officeooo:rsid="001bacdb"/>
    </style:style>
    <style:style style:name="T5" style:family="text">
      <style:text-properties officeooo:rsid="001bacdb"/>
    </style:style>
    <style:style style:name="T6" style:family="text">
      <style:text-properties style:text-underline-style="dotted" style:text-underline-width="bold" style:text-underline-color="font-color" fo:font-weight="normal" style:font-weight-asian="normal" style:font-weight-complex="normal"/>
    </style:style>
    <style:style style:name="T7" style:family="text">
      <style:text-properties style:text-underline-style="dotted" style:text-underline-width="bold" style:text-underline-color="font-color"/>
    </style:style>
    <style:style style:name="T8" style:family="text">
      <style:text-properties style:text-underline-style="solid" style:text-underline-width="bold" style:text-underline-color="font-color" fo:font-weight="bold" officeooo:rsid="001e5a88" style:font-weight-asian="bold" style:font-weight-complex="bold"/>
    </style:style>
    <style:style style:name="T9" style:family="text">
      <style:text-properties officeooo:rsid="001e5a88"/>
    </style:style>
    <style:style style:name="T10" style:family="text">
      <style:text-properties style:text-underline-style="none" fo:font-weight="normal" officeooo:rsid="00204b3b" style:font-weight-asian="normal" style:font-weight-complex="normal"/>
    </style:style>
    <style:style style:name="T11" style:family="text">
      <style:text-properties style:text-underline-style="solid" style:text-underline-width="bold" style:text-underline-color="font-color"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dotted" style:text-underline-width="bold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3</text:p>
      <text:p text:style-name="P1">Tema 4</text:p>
      <text:p text:style-name="P1">Base de Datos</text:p>
      <text:p text:style-name="P2"><text:span text:style-name="T1">Aday Trandafir Garcia</text:span></text:p>
      <text:p text:style-name="P2"/>
      <text:p text:style-name="P1">1.</text:p>
      <text:p text:style-name="P1"/>
      <text:p text:style-name="P1">Representante( <text:span text:style-name="T2">#id</text:span>, nombre)</text:p>
      <text:p text:style-name="P1">Futbolista ( <text:span text:style-name="T3">#id</text:span>, nombre, <text:span text:style-name="T4">representante_id</text:span>)</text:p>
      <text:p text:style-name="P1"><text:tab/><text:tab/><text:span text:style-name="T5">representante_id → Representante(Not Null, M.C ,B.R)</text:span></text:p>
      <text:p text:style-name="P1"/>
      <text:p text:style-name="P3">2.</text:p>
      <text:p text:style-name="P4"/>
      <text:p text:style-name="P5">Representante(<text:span text:style-name="T3">#id</text:span>, Nombre) <text:s/></text:p>
      <text:p text:style-name="P5">Jugadores (<text:span text:style-name="T3">#id</text:span>, Nombre) </text:p>
      <text:p text:style-name="P5">TieneRe (<text:span text:style-name="T3">#id_jugador</text:span>, <text:span text:style-name="T6">id_representante</text:span>, FechaContratacion, Comision, Importe) </text:p>
      <text:p text:style-name="P5"><text:tab/><text:tab/>Id_jugador → <text:s/>Jugadores(<text:span text:style-name="T5">Not Null, </text:span>MC,BC) </text:p>
      <text:p text:style-name="P5"><text:tab/><text:tab/>Id_representante → <text:s/>Representante(<text:span text:style-name="T5">Not Null, </text:span>MC, BN) </text:p>
      <text:p text:style-name="P5"/>
      <text:p text:style-name="P3">3.</text:p>
      <text:p text:style-name="P3"/>
      <text:p text:style-name="P6">Profesor(<text:span text:style-name="T3">#id</text:span>, nombre)</text:p>
      <text:p text:style-name="P6">Asignatura(<text:span text:style-name="T3">#id</text:span>, nombre, especibilidad, <text:span text:style-name="T7">profesor_id</text:span>)</text:p>
      <text:p text:style-name="P6"><text:tab/><text:tab/>profesor_id → profesor(Not Null, MC, BR)</text:p>
      <text:p text:style-name="P6"/>
      <text:p text:style-name="P6">4.</text:p>
      <text:p text:style-name="P6"/>
      <text:p text:style-name="P6">Corredor(<text:span text:style-name="T8">#id</text:span><text:span text:style-name="T9">, nombre, fecha_nacimiento, teléfono</text:span>)</text:p>
      <text:p text:style-name="P7">Clubs(<text:span text:style-name="T3">#id</text:span>, nombre, ciudad)</text:p>
      <text:p text:style-name="P7">Telefono(<text:span text:style-name="T3">#corredor_id, #teléfono</text:span>)</text:p>
      <text:p text:style-name="P8"><text:tab/><text:tab/><text:span text:style-name="T10">corredor_id → corredor(Not Null, MR, BC)</text:span></text:p>
      <text:p text:style-name="P7">TieneClub(<text:span text:style-name="T3">#corredor_id</text:span><text:span text:style-name="T11"> </text:span><text:span text:style-name="T12"><text:s/>, </text:span><text:span text:style-name="T13">clubs_id,</text:span><text:span text:style-name="T12"> </text:span><text:span text:style-name="T10">Fecha)</text:span></text:p>
      <text:p text:style-name="P9"><text:tab/><text:tab/>corredor_id → corredor(Not Null, MR, BC)</text:p>
      <text:p text:style-name="P9"><text:tab/><text:tab/>clubs_id → clubs(Not Null, MR, B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0:36:29.548209600</meta:creation-date>
    <dc:date>2025-11-17T11:26:51.192207700</dc:date>
    <meta:editing-duration>PT3M43S</meta:editing-duration>
    <meta:editing-cycles>1</meta:editing-cycles>
    <meta:document-statistic meta:table-count="0" meta:image-count="0" meta:object-count="0" meta:page-count="1" meta:paragraph-count="26" meta:word-count="93" meta:character-count="796" meta:non-whitespace-character-count="706"/>
    <meta:generator>LibreOffice/25.8.2.2$Windows_X86_64 LibreOffice_project/d401f2107ccab8f924a8e2df40f573aab7605b6f</meta:generator>
  </office:meta>
</office:document-meta>
</file>