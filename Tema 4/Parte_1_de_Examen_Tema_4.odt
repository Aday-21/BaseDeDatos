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officeooo:rsid="001e2eac" officeooo:paragraph-rsid="001e2eac" style:font-size-asian="10pt" style:font-size-complex="10pt"/>
    </style:style>
    <style:style style:name="P2" style:family="paragraph" style:parent-style-name="Standard">
      <style:text-properties style:font-name="Courier New" fo:font-size="10pt" fo:font-weight="bold" officeooo:rsid="001e2eac" officeooo:paragraph-rsid="001e2eac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ourier New" fo:font-size="10pt" fo:font-weight="normal" officeooo:rsid="001e2eac" officeooo:paragraph-rsid="001e2eac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Courier New" fo:font-size="10pt" style:text-underline-style="none" fo:font-weight="normal" officeooo:rsid="001e2eac" officeooo:paragraph-rsid="001e2eac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Courier New" fo:font-size="10pt" style:text-underline-style="none" fo:font-weight="normal" officeooo:rsid="001e2eac" officeooo:paragraph-rsid="001f4aa4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Courier New" fo:font-size="10pt" style:text-underline-style="none" fo:font-weight="normal" officeooo:rsid="001f4aa4" officeooo:paragraph-rsid="001f4aa4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Courier New" fo:font-size="10pt" style:text-underline-style="none" fo:font-weight="bold" officeooo:rsid="001f4aa4" officeooo:paragraph-rsid="001f4aa4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Courier New" fo:font-size="10pt" fo:font-weight="normal" officeooo:rsid="001e2eac" officeooo:paragraph-rsid="001f4aa4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Courier New" fo:font-size="10pt" style:text-underline-style="none" fo:font-weight="normal" officeooo:rsid="001e2eac" officeooo:paragraph-rsid="001f98e9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Courier New" fo:font-size="10pt" style:text-underline-style="none" fo:font-weight="normal" officeooo:rsid="001f4aa4" officeooo:paragraph-rsid="001f98e9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Courier New" fo:font-size="10pt" style:text-underline-style="none" fo:font-weight="normal" officeooo:rsid="001f98e9" officeooo:paragraph-rsid="001f98e9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Courier New" fo:font-size="10pt" fo:font-weight="normal" officeooo:rsid="001e2eac" officeooo:paragraph-rsid="0021673d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Courier New" fo:font-size="10pt" style:text-underline-style="none" fo:font-weight="normal" officeooo:rsid="001e2eac" officeooo:paragraph-rsid="0021673d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Courier New" fo:font-size="10pt" style:text-underline-style="none" fo:font-weight="normal" officeooo:rsid="0021673d" officeooo:paragraph-rsid="0021673d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Courier New" fo:font-size="10pt" style:text-underline-style="none" fo:font-weight="bold" officeooo:rsid="00225283" officeooo:paragraph-rsid="00225283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Courier New" fo:font-size="10pt" style:text-underline-style="none" fo:font-weight="normal" officeooo:rsid="001e2eac" officeooo:paragraph-rsid="00225283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Courier New" fo:font-size="10pt" style:text-underline-style="none" fo:font-weight="normal" officeooo:rsid="001f4aa4" officeooo:paragraph-rsid="00225283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Courier New" fo:font-size="10pt" style:text-underline-style="none" fo:font-weight="normal" officeooo:rsid="001f98e9" officeooo:paragraph-rsid="00225283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Courier New" fo:font-size="10pt" fo:font-weight="normal" officeooo:rsid="001e2eac" officeooo:paragraph-rsid="00225283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Courier New" fo:font-size="10pt" style:text-underline-style="none" fo:font-weight="normal" officeooo:rsid="0021673d" officeooo:paragraph-rsid="00225283" style:font-size-asian="10pt" style:font-weight-asian="normal" style:font-size-complex="10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officeooo:rsid="0022c996"/>
    </style:style>
    <style:style style:name="T5" style:family="text">
      <style:text-properties officeooo:rsid="001f98e9"/>
    </style:style>
    <style:style style:name="T6" style:family="text">
      <style:text-properties style:text-underline-style="dotted" style:text-underline-width="bold" style:text-underline-color="font-color" officeooo:rsid="0021673d"/>
    </style:style>
    <style:style style:name="T7" style:family="text">
      <style:text-properties officeooo:rsid="0021673d"/>
    </style:style>
    <style:style style:name="T8" style:family="text">
      <style:text-properties officeooo:rsid="00225283"/>
    </style:style>
    <style:style style:name="T9" style:family="text">
      <style:text-properties style:text-underline-style="dotted" style:text-underline-width="bold" style:text-underline-color="font-color"/>
    </style:style>
    <style:style style:name="T10" style:family="text">
      <style:text-properties style:text-underline-style="dotted" style:text-underline-width="bold" style:text-underline-color="font-color" officeooo:rsid="001f98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e 1 </text:p>
      <text:p text:style-name="P1">Examen Tema 4</text:p>
      <text:p text:style-name="P1">Curso 25/26</text:p>
      <text:p text:style-name="P1"/>
      <text:p text:style-name="P2">1. Regla de transformación de entidad y atributo.</text:p>
      <text:p text:style-name="P2"/>
      <text:p text:style-name="P3"><text:span text:style-name="T1">Vivienda(</text:span><text:span text:style-name="T2">#id</text:span><text:span text:style-name="T1">, direccion, superficie, </text:span><text:span text:style-name="T3">n_castastral</text:span><text:span text:style-name="T1">) </text:span></text:p>
      <text:p text:style-name="P4">Departamento(<text:span text:style-name="T2">#id</text:span>, nombre)</text:p>
      <text:p text:style-name="P4">Empleados(<text:span text:style-name="T2">#id</text:span>, <text:span text:style-name="T3">dni</text:span>, nombre, departamento, <text:span text:style-name="T3">NSS</text:span>)</text:p>
      <text:p text:style-name="P4">CITA(<text:span text:style-name="T2">#id,</text:span> fecha, hora, descripcion)</text:p>
      <text:p text:style-name="P4">HABITANTES(<text:span text:style-name="T2">#id</text:span>, nombre, <text:span text:style-name="T3">dni</text:span>, fecha_nac, nacionalidad)</text:p>
      <text:p text:style-name="P4">PARADOS(<text:span text:style-name="T2">#HABITANTES_id</text:span>, fecha, personas_cargo, subsidio)</text:p>
      <text:p text:style-name="P4"><text:tab/>HABITANTES_id → HABITANTES(NN, B<text:span text:style-name="T4">R</text:span>, MR)</text:p>
      <text:p text:style-name="P4">EMPLEADOS(<text:span text:style-name="T2">#EMPLEADOS_id</text:span>, fecha_inicio, empresa, <text:span text:style-name="T3">NSS</text:span>, salario, indefinido)</text:p>
      <text:p text:style-name="P5"><text:tab/>HABITANTES_id → HABITANTES(NN, B<text:span text:style-name="T4">R</text:span>, MR)</text:p>
      <text:p text:style-name="P5">ESTUDIANTES(<text:span text:style-name="T2">#EMPLEADOS_id</text:span>, nivel, <text:span text:style-name="T3">matricula</text:span>, centro)</text:p>
      <text:p text:style-name="P5"><text:tab/>HABITANTES_id → HABITANTES(NN, B<text:span text:style-name="T4">R</text:span>, MR)</text:p>
      <text:p text:style-name="P6">BECAS(<text:span text:style-name="T2">#id</text:span>, requisitos, importe)</text:p>
      <text:p text:style-name="P6">ACTIVIDADES(<text:span text:style-name="T2">#id</text:span>, descripcion, tipo, nombre)</text:p>
      <text:p text:style-name="P6">CURSO(<text:span text:style-name="T2">#id</text:span>, horas, jornadas, titulo)</text:p>
      <text:p text:style-name="P6"/>
      <text:p text:style-name="P7">2. Regla de transformación Relación M:N</text:p>
      <text:p text:style-name="P7"/>
      <text:p text:style-name="P8"><text:span text:style-name="T1">Vivienda(</text:span><text:span text:style-name="T2">#id</text:span><text:span text:style-name="T1">, direccion, superficie, </text:span><text:span text:style-name="T3">n_castastral</text:span><text:span text:style-name="T1">) </text:span></text:p>
      <text:p text:style-name="P5">Departamento(<text:span text:style-name="T2">#id</text:span>, nombre)</text:p>
      <text:p text:style-name="P5">Empleados(<text:span text:style-name="T2">#id</text:span>, <text:span text:style-name="T3">dni</text:span>, nombre, departamento, <text:span text:style-name="T3">NSS</text:span>)</text:p>
      <text:p text:style-name="P5">CITA(<text:span text:style-name="T2">#id,</text:span> fecha, hora, descripcion)</text:p>
      <text:p text:style-name="P5">HABITANTES(<text:span text:style-name="T2">#id</text:span>, nombre, <text:span text:style-name="T3">dni</text:span>, fecha_nac, nacionalidad)</text:p>
      <text:p text:style-name="P6"/>
      <text:p text:style-name="P6"/>
      <text:p text:style-name="P6"/>
      <text:p text:style-name="P5">PARADOS(<text:span text:style-name="T2">#HABITANTES_id</text:span>, fecha, personas_cargo, subsidio)</text:p>
      <text:p text:style-name="P5"><text:tab/>HABITANTES_id → HABITANTES(NN, B<text:span text:style-name="T4">R</text:span>, MR)</text:p>
      <text:p text:style-name="P6">CURSO(<text:span text:style-name="T2">#id</text:span>, horas, jornadas, titulo)</text:p>
      <text:p text:style-name="P6"/>
      <text:p text:style-name="P6">Matriculan(<text:span text:style-name="T2">#PARADOS_id, #CURSO_id</text:span>, fecha_inicio, fecha_fin)</text:p>
      <text:p text:style-name="P6"><text:tab/>PARADOS_id → HABITANTES(NN, BR, MR)</text:p>
      <text:p text:style-name="P6"><text:tab/>CURSO_id → CURSO(NN, BR, MR)</text:p>
      <text:p text:style-name="P6"/>
      <text:p text:style-name="P5">ESTUDIANTES(<text:span text:style-name="T2">#EMPLEADOS_id</text:span>, nivel, <text:span text:style-name="T3">matricula</text:span>, centro)</text:p>
      <text:p text:style-name="P5"><text:tab/>HABITANTES_id → HABITANTES(NN, B<text:span text:style-name="T4">R</text:span>, MR)</text:p>
      <text:p text:style-name="P6">BECAS(<text:span text:style-name="T2">#id</text:span>, requisitos, importe)</text:p>
      <text:p text:style-name="P6"/>
      <text:p text:style-name="P6">Solicitan_beca(<text:span text:style-name="T2">#ESTUDIANTES_id, #BECAS_id</text:span>)</text:p>
      <text:p text:style-name="P6"><text:tab/>ESTUDIANTES_id → HABITANTEs(NN, BR, MR)</text:p>
      <text:p text:style-name="P6"><text:tab/>BECAS_id → BECAS(NN, BR, MR)</text:p>
      <text:p text:style-name="P6"/>
      <text:p text:style-name="P9">EMPLEADOS(<text:span text:style-name="T2">#EMPLEADOS_id</text:span>, fecha_inicio, empresa, <text:span text:style-name="T3">NSS</text:span>, salario, indefinido)</text:p>
      <text:p text:style-name="P9"><text:tab/>HABITANTES_id → HABITANTES(NN, B<text:span text:style-name="T4">R</text:span>, MR)</text:p>
      <text:p text:style-name="P10">ACTIVIDADES(<text:span text:style-name="T2">#id</text:span>, descripcion, tipo, nombre)</text:p>
      <text:p text:style-name="P10"/>
      <text:p text:style-name="P11">Inscripcion(<text:span text:style-name="T2">#EMPLEADOS_id, #ACTIVIDADES_id</text:span>, FechaFin, FechaInicio)</text:p>
      <text:p text:style-name="P11"><text:tab/>EMPLEADOS_id → HABITANTES(NN, BR, MR)</text:p>
      <text:p text:style-name="P11"><text:tab/>ACTIVIDADES_id → ACTIVIDADES(MM, BR, MR)</text:p>
      <text:p text:style-name="P7"/>
      <text:p text:style-name="P7"/>
      <text:p text:style-name="P7">3. Regla de transformación Relacón 1:N</text:p>
      <text:p text:style-name="P10"/>
      <text:p text:style-name="P9">PARADOS(<text:span text:style-name="T2">#HABITANTES_id</text:span>, fecha, personas_cargo, subsidio)</text:p>
      <text:p text:style-name="P9"><text:tab/>HABITANTES_id → HABITANTES(NN, B<text:span text:style-name="T4">R</text:span>, MR)</text:p>
      <text:p text:style-name="P10">CURSO(<text:span text:style-name="T2">#id</text:span>, horas, jornadas, titulo)</text:p>
      <text:p text:style-name="P10"/>
      <text:p text:style-name="P10">Matriculan(<text:span text:style-name="T2">#PARADOS_id, #CURSO_id</text:span>, fecha_inicio, fecha_fin)</text:p>
      <text:p text:style-name="P10"><text:tab/>PARADOS_id → HABITANTES(NN, BR, MR)</text:p>
      <text:p text:style-name="P10"><text:soft-page-break/><text:tab/>CURSO_id → CURSO(NN, BR, MR)</text:p>
      <text:p text:style-name="P10"/>
      <text:p text:style-name="P9">ESTUDIANTES(<text:span text:style-name="T2">#EMPLEADOS_id</text:span>, nivel, <text:span text:style-name="T3">matricula</text:span>, centro)</text:p>
      <text:p text:style-name="P9"><text:tab/>HABITANTES_id → HABITANTES(NN, B<text:span text:style-name="T4">R</text:span>, MR)</text:p>
      <text:p text:style-name="P10">BECAS(<text:span text:style-name="T2">#id</text:span>, requisitos, importe)</text:p>
      <text:p text:style-name="P10"/>
      <text:p text:style-name="P10"><text:span text:style-name="T5">Piden</text:span>_beca(<text:span text:style-name="T2">#ESTUDIANTES_id, #BECAS_id</text:span>)</text:p>
      <text:p text:style-name="P10"><text:tab/>ESTUDIANTES_id → HABITANTE<text:span text:style-name="T4">S</text:span>(NN, B<text:span text:style-name="T4">R</text:span>, MR)</text:p>
      <text:p text:style-name="P10"><text:tab/>BECAS_id → BECAS(NN, BR, MR)</text:p>
      <text:p text:style-name="P10"/>
      <text:p text:style-name="P9">EMPLEADOS(<text:span text:style-name="T2">#EMPLEADOS_id</text:span>, fecha_inicio, empresa, <text:span text:style-name="T3">NSS</text:span>, salario, indefinido)</text:p>
      <text:p text:style-name="P9"><text:tab/>HABITANTES_id → HABITANTES(NN, B<text:span text:style-name="T4">R</text:span>, MR)</text:p>
      <text:p text:style-name="P10">ACTIVIDADES(<text:span text:style-name="T2">#id</text:span>, descripcion, tipo, nombre)</text:p>
      <text:p text:style-name="P10"/>
      <text:p text:style-name="P11">Inscripcion(<text:span text:style-name="T2">#EMPLEADOS_id, #ACTIVIDADES_id</text:span>, FechaFin, FechaInicio)</text:p>
      <text:p text:style-name="P11"><text:tab/>EMPLEADOS_id → HABITANTES(NN, BR, MR)</text:p>
      <text:p text:style-name="P11"><text:tab/>ACTIVIDADES_id → ACTIVIDADES(NN, BR, MR)</text:p>
      <text:p text:style-name="P9"/>
      <text:p text:style-name="P12">Vivienda(<text:span text:style-name="T2">#id</text:span>, direccion, superficie, <text:span text:style-name="T3">n_castastral</text:span>) </text:p>
      <text:p text:style-name="P13">HABITANTES(<text:span text:style-name="T2">#id</text:span>, nombre, <text:span text:style-name="T3">dni</text:span>, fecha_nac, nacionalidad, <text:span text:style-name="T6">Vivienda_id</text:span><text:span text:style-name="T7">, f_empadrona</text:span>)</text:p>
      <text:p text:style-name="P13"><text:tab/><text:span text:style-name="T7">Vivienda_id → Vivienda(NN, B</text:span><text:span text:style-name="T8">R</text:span><text:span text:style-name="T7">, M</text:span><text:span text:style-name="T8">R</text:span><text:span text:style-name="T7">)</text:span></text:p>
      <text:p text:style-name="P13"/>
      <text:p text:style-name="P13">Departamento(<text:span text:style-name="T2">#id</text:span>, nombre</text:p>
      <text:p text:style-name="P14">Pertenece(<text:span text:style-name="T2">#</text:span><text:span text:style-name="T2">Empleados_id</text:span>, <text:span text:style-name="T9">Departamento_id</text:span>)</text:p>
      <text:p text:style-name="P14"><text:tab/>Empleados_id → Empleados(NN, BR, MR)</text:p>
      <text:p text:style-name="P14"><text:tab/>Departamento_id → Departamento(NN, B<text:span text:style-name="T8">R</text:span>, M<text:span text:style-name="T8">R</text:span>)</text:p>
      <text:p text:style-name="P13"/>
      <text:p text:style-name="P13">Empleados(<text:span text:style-name="T2">#id</text:span>, <text:span text:style-name="T3">dni</text:span>, nombre, departamento, <text:span text:style-name="T3">NSS</text:span>)</text:p>
      <text:p text:style-name="P13">CITA(<text:span text:style-name="T2">#id,</text:span> fecha, hora, descripcion, <text:span text:style-name="T10">HABITANTES_id</text:span><text:span text:style-name="T5">, </text:span><text:span text:style-name="T6">Empleados_id</text:span><text:span text:style-name="T7">, descripcion, fecha_inicio, fecha_fin, resolucion)</text:span></text:p>
      <text:p text:style-name="P13"><text:tab/><text:span text:style-name="T5">HABITANTES_id → HABITANTES(NN, B</text:span><text:span text:style-name="T8">R</text:span><text:span text:style-name="T5">, M</text:span><text:span text:style-name="T8">R</text:span><text:span text:style-name="T5">)</text:span></text:p>
      <text:p text:style-name="P14"><text:tab/>Empleados_id → Empleados(NN, BR, MR)</text:p>
      <text:p text:style-name="P14"/>
      <text:p text:style-name="P15">4. Forma definitiva de la transformación.</text:p>
      <text:p text:style-name="P15"/>
      <text:p text:style-name="P16">PARADOS(<text:span text:style-name="T2">#HABITANTES_id</text:span>, fecha, personas_cargo, subsidio)</text:p>
      <text:p text:style-name="P16"><text:tab/>HABITANTES_id → HABITANTES(NN, B<text:span text:style-name="T4">R</text:span>, MR)</text:p>
      <text:p text:style-name="P17">CURSO(<text:span text:style-name="T2">#id</text:span>, horas, jornadas, titulo)</text:p>
      <text:p text:style-name="P17"/>
      <text:p text:style-name="P17">Matriculan(<text:span text:style-name="T2">#PARADOS_id, #CURSO_id</text:span>, fecha_inicio, fecha_fin)</text:p>
      <text:p text:style-name="P17"><text:tab/>PARADOS_id → HABITANTES(NN, BR, MR)</text:p>
      <text:p text:style-name="P17"><text:tab/>CURSO_id → CURSO(NN, BR, MR)</text:p>
      <text:p text:style-name="P17"/>
      <text:p text:style-name="P16">ESTUDIANTES(<text:span text:style-name="T2">#EMPLEADOS_id</text:span>, nivel, <text:span text:style-name="T3">matricula</text:span>, centro)</text:p>
      <text:p text:style-name="P16"><text:tab/>HABITANTES_id → HABITANTES(NN, B<text:span text:style-name="T4">R</text:span>, MR)</text:p>
      <text:p text:style-name="P17">BECAS(<text:span text:style-name="T2">#id</text:span>, requisitos, importe)</text:p>
      <text:p text:style-name="P17"/>
      <text:p text:style-name="P17"><text:span text:style-name="T5">Piden</text:span>_beca(<text:span text:style-name="T2">#ESTUDIANTES_id, #BECAS_id</text:span>)</text:p>
      <text:p text:style-name="P17"><text:tab/>ESTUDIANTES_id → HABITANTEs(NN, B<text:span text:style-name="T4">R</text:span>, MR)</text:p>
      <text:p text:style-name="P17"><text:tab/>BECAS_id → BECAS(NN, BR, MR)</text:p>
      <text:p text:style-name="P17"/>
      <text:p text:style-name="P16">EMPLEADOS(<text:span text:style-name="T2">#EMPLEADOS_id</text:span>, fecha_inicio, empresa, <text:span text:style-name="T3">NSS</text:span>, salario, indefinido)</text:p>
      <text:p text:style-name="P16"><text:tab/>HABITANTES_id → HABITANTES(NN, B<text:span text:style-name="T4">R</text:span>, MR)</text:p>
      <text:p text:style-name="P17">ACTIVIDADES(<text:span text:style-name="T2">#id</text:span>, descripcion, tipo, nombre)</text:p>
      <text:p text:style-name="P17"/>
      <text:p text:style-name="P18">Inscripcion(<text:span text:style-name="T2">#EMPLEADOS_id, #ACTIVIDADES_id</text:span>, FechaFin, FechaInicio)</text:p>
      <text:p text:style-name="P18"><text:tab/>EMPLEADOS_id → HABITANTES(NN, BR, MR)</text:p>
      <text:p text:style-name="P18"><text:tab/>ACTIVIDADES_id → ACTIVIDADES(NN, BR, MR)</text:p>
      <text:p text:style-name="P16"/>
      <text:p text:style-name="P19">Vivienda(<text:span text:style-name="T2">#id</text:span>, direccion, superficie, <text:span text:style-name="T3">n_castastral</text:span>) </text:p>
      <text:p text:style-name="P16">HABITANTES(<text:span text:style-name="T2">#id</text:span>, nombre, <text:span text:style-name="T3">dni</text:span>, fecha_nac, nacionalidad, <text:span text:style-name="T6">Vivienda_id</text:span><text:span text:style-name="T7">, f_empadrona</text:span>)</text:p>
      <text:p text:style-name="P16"><text:tab/><text:span text:style-name="T7">Vivienda_id → Vivienda(NN, B</text:span><text:span text:style-name="T8">R</text:span><text:span text:style-name="T7">, M</text:span><text:span text:style-name="T8">R</text:span><text:span text:style-name="T7">)</text:span></text:p>
      <text:p text:style-name="P16"/>
      <text:p text:style-name="P16">Departamento(<text:span text:style-name="T2">#id</text:span>, nombre</text:p>
      <text:p text:style-name="P20"><text:soft-page-break/>Pertenece(<text:span text:style-name="T2">#Empleados_id</text:span>, <text:span text:style-name="T9">Departamento_id</text:span>)</text:p>
      <text:p text:style-name="P20"><text:tab/>Empleados_id → Empleados(NN, BR, MR)</text:p>
      <text:p text:style-name="P20"><text:tab/>Departamento_id → Departamento(NN, B<text:span text:style-name="T8">R</text:span>, M<text:span text:style-name="T8">R</text:span>)</text:p>
      <text:p text:style-name="P16"/>
      <text:p text:style-name="P16">Empleados(<text:span text:style-name="T2">#id</text:span>, <text:span text:style-name="T3">dni</text:span>, nombre, departamento, <text:span text:style-name="T3">NSS</text:span>)</text:p>
      <text:p text:style-name="P16">CITA(<text:span text:style-name="T2">#id,</text:span> fecha, hora, descripcion, <text:span text:style-name="T10">HABITANTES_id</text:span><text:span text:style-name="T5">, </text:span><text:span text:style-name="T6">Empleados_id</text:span><text:span text:style-name="T7">, descripcion, fecha_inicio, fecha_fin, resolucion)</text:span></text:p>
      <text:p text:style-name="P16"><text:tab/><text:span text:style-name="T5">HABITANTES_id → HABITANTES(NN, B</text:span><text:span text:style-name="T8">R</text:span><text:span text:style-name="T5">, M</text:span><text:span text:style-name="T8">R</text:span><text:span text:style-name="T5">)</text:span></text:p>
      <text:p text:style-name="P20"><text:tab/>Empleados_id → Empleados(NN, BR, MR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09:44:22.725741100</meta:creation-date>
    <dc:date>2025-12-01T10:35:02.784117800</dc:date>
    <meta:editing-duration>PT4M46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3" meta:paragraph-count="102" meta:word-count="463" meta:character-count="4471" meta:non-whitespace-character-count="4065"/>
  </office:meta>
</office:document-meta>
</file>