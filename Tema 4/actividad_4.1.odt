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88da1" officeooo:paragraph-rsid="00188da1" style:font-size-asian="8.75pt" style:font-size-complex="10pt"/>
    </style:style>
    <style:style style:name="P2" style:family="paragraph" style:parent-style-name="Standard">
      <style:text-properties style:font-name="Courier New" fo:font-size="10pt" officeooo:rsid="001bf924" officeooo:paragraph-rsid="001bf924" style:font-size-asian="8.75pt" style:font-size-complex="10pt"/>
    </style:style>
    <style:style style:name="P3" style:family="paragraph" style:parent-style-name="Standard">
      <style:text-properties style:font-name="Courier New" fo:font-size="15pt" officeooo:rsid="00188da1" officeooo:paragraph-rsid="00188da1" style:font-size-asian="13.1000003814697pt" style:font-size-complex="15pt"/>
    </style:style>
    <style:style style:name="P4" style:family="paragraph" style:parent-style-name="Standard">
      <style:text-properties style:font-name="Courier New" fo:font-size="10pt" officeooo:rsid="00188da1" officeooo:paragraph-rsid="001d7152" style:font-size-asian="10pt" style:font-size-complex="10pt"/>
    </style:style>
    <style:style style:name="P5" style:family="paragraph" style:parent-style-name="Standard">
      <style:text-properties style:font-name="Courier New" fo:font-size="10pt" style:text-underline-style="none" fo:font-weight="normal" officeooo:rsid="00188da1" officeooo:paragraph-rsid="001d7152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officeooo:rsid="001a6704" officeooo:paragraph-rsid="001d7152" style:font-size-asian="10pt" style:font-size-complex="10pt"/>
    </style:style>
    <style:style style:name="P7" style:family="paragraph" style:parent-style-name="Standard">
      <style:text-properties style:font-name="Courier New" fo:font-size="10pt" officeooo:rsid="00193072" officeooo:paragraph-rsid="001d7152" style:font-size-asian="10pt" style:font-size-complex="10pt"/>
    </style:style>
    <style:style style:name="T1" style:family="text">
      <style:text-properties officeooo:rsid="001ab899"/>
    </style:style>
    <style:style style:name="T2" style:family="text">
      <style:text-properties style:font-name="Courier New" style:text-underline-style="none" fo:font-weight="normal" officeooo:rsid="00188da1" style:font-weight-asian="normal" style:font-weight-complex="normal"/>
    </style:style>
    <style:style style:name="T3" style:family="text">
      <style:text-properties style:text-underline-style="none" fo:font-weight="normal" officeooo:rsid="00193072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93072"/>
    </style:style>
    <style:style style:name="T9" style:family="text">
      <style:text-properties style:text-underline-style="solid" style:text-underline-width="auto" style:text-underline-color="font-color" fo:font-weight="bold" officeooo:rsid="00193072" style:font-weight-asian="bold" style:font-weight-complex="bold"/>
    </style:style>
    <style:style style:name="T10" style:family="text">
      <style:text-properties style:text-underline-style="solid" style:text-underline-type="double" style:text-underline-width="auto" style:text-underline-color="font-color" fo:font-weight="normal" officeooo:rsid="00193072" style:font-weight-asian="normal" style:font-weight-complex="normal"/>
    </style:style>
    <style:style style:name="T11" style:family="text">
      <style:text-properties style:text-underline-style="none" fo:font-weight="bold" officeooo:rsid="00193072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93072" style:font-weight-asian="normal" style:font-weight-complex="normal"/>
    </style:style>
    <style:style style:name="T15" style:family="text">
      <style:text-properties fo:font-weight="bold" officeooo:rsid="0019307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Actividad 4.1 </text:p>
      <text:p text:style-name="P2">Tema 4</text:p>
      <text:p text:style-name="P2">Base de Datos</text:p>
      <text:p text:style-name="P1">A<text:span text:style-name="T1">day Trandafir Garcia</text:span></text:p>
      <text:p text:style-name="P1"/>
      <text:p text:style-name="P3"/>
      <text:p text:style-name="P4">1.</text:p>
      <text:p text:style-name="P4"><text:span text:style-name="T2"/></text:p>
      <text:p text:style-name="P4"><text:span text:style-name="T3">Vehiculos</text:span><text:span text:style-name="T4">{#</text:span><text:span text:style-name="T5">id</text:span><text:span text:style-name="T6">, </text:span><text:span text:style-name="T7">matricula</text:span><text:span text:style-name="T4">, </text:span><text:span text:style-name="T7">n_bastidor*</text:span><text:span text:style-name="T4">, marca, modelo, fecha_matricula, motor, <text:s/></text:span></text:p>
      <text:p text:style-name="P5"/>
      <text:p text:style-name="P4"><text:span text:style-name="T4">cilindrada*, color*, antiguedad-d</text:span>}</text:p>
      <text:p text:style-name="P4"/>
      <text:p text:style-name="P4">2.</text:p>
      <text:p text:style-name="P4"/>
      <text:p text:style-name="P4"><text:span text:style-name="T8">Libro</text:span>{<text:span text:style-name="T8">#</text:span><text:span text:style-name="T9">id</text:span><text:span text:style-name="T3">, titulo, </text:span><text:span text:style-name="T10">ISBN</text:span><text:span text:style-name="T11">, </text:span><text:span text:style-name="T3">páginas*</text:span>}</text:p>
      <text:p text:style-name="P4"/>
      <text:p text:style-name="P6">EdicionLibro(<text:span text:style-name="T11">#id, #Ediciones</text:span><text:span text:style-name="T6">)</text:span></text:p>
      <text:p text:style-name="P7"/>
      <text:p text:style-name="P7">3.</text:p>
      <text:p text:style-name="P7"/>
      <text:p text:style-name="P7">Articulo{<text:span text:style-name="T12">#id_articulo</text:span><text:span text:style-name="T13">, fechaFab, Descripcion, duración, fechaCadu*</text:span>}</text:p>
      <text:p text:style-name="P6">PrecioArtículo(<text:span text:style-name="T9">#id_articulo</text:span><text:span text:style-name="T14">, </text:span><text:span text:style-name="T9">#Precios</text:span><text:span text:style-name="T13">)</text:span></text:p>
      <text:p text:style-name="P7"/>
      <text:p text:style-name="P7">4.</text:p>
      <text:p text:style-name="P7"/>
      <text:p text:style-name="P7">Clientes{<text:span text:style-name="T12">#idcliente, </text:span><text:span text:style-name="T13">fechaNac, Nombre, edad*-d,</text:span><text:span text:style-name="T12"> </text:span><text:span text:style-name="T7">dni*</text:span><text:span text:style-name="T4">, calle, numero, edifio, portal</text:span>}</text:p>
      <text:p text:style-name="P6">EmailCliente(<text:span text:style-name="T15">#idcliente,#email</text:span>)</text:p>
      <text:p text:style-name="P6">TelefonoCliente(<text:span text:style-name="T15">#idcliente,#telefonos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09:50:24.225112400</meta:creation-date>
    <dc:date>2025-11-17T10:23:45.597813700</dc:date>
    <meta:editing-duration>PT16M26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7" meta:word-count="49" meta:character-count="497" meta:non-whitespace-character-count="463"/>
  </office:meta>
</office:document-meta>
</file>